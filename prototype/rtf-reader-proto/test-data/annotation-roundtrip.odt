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华文宋体" svg:font-family="华文宋体" style:font-family-generic="system" style:font-pitch="variable"/>
  </office:font-face-decls>
  <office:automatic-styles>
    <style:style style:name="T1" style:family="text">
      <style:text-properties fo:font-family="Arial" style:font-family-generic="roman" style:font-pitch="variable" fo:font-size="12pt" style:font-size-asian="12pt"/>
    </style:style>
    <style:style style:name="T2" style:family="text">
      <style:text-properties fo:font-family="Arial" style:font-family-generic="roman" style:font-pitch="variabl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This is sample text with an </text:span><text:span text:style-name="T1"><office:annotation office:name="__Annotation__4_210569195" loext:resolved="false"><dc:creator>Reviewer</dc:creator><dc:date>0000-00-00T00:00:00</dc:date><meta:creator-initials>1</meta:creator-initials><text:p><text:span text:style-name="T2">This is a roundtrip annotation comment.</text:span></text:p></office:annotation></text:span><text:span text:style-name="T1">annotated</text:span><office:annotation-end office:name="__Annotation__4_210569195"/><text:span text:style-name="T1"> word in the middl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华文宋体" svg:font-family="华文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TF Reader Proto</meta:initial-creator>
    <meta:document-statistic meta:table-count="0" meta:image-count="0" meta:object-count="0" meta:page-count="1" meta:paragraph-count="1" meta:word-count="11" meta:character-count="57" meta:non-whitespace-character-count="47"/>
    <meta:generator>LibreOffice/26.2.4.2$MacOSX_AARCH64 LibreOffice_project/0229ac93fcf0d7cbc6376066c6f35021cef002dc</meta:generator>
  </office:meta>
</office:document-meta>
</file>